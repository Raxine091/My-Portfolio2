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0000002548E5B8F92.png" manifest:media-type="image/png"/>
  <manifest:file-entry manifest:full-path="Pictures/100000010000035000000254E2B2389B.png" manifest:media-type="image/png"/>
  <manifest:file-entry manifest:full-path="Pictures/100000000000015F00000217466655E4.jpg" manifest:media-type="image/jpeg"/>
  <manifest:file-entry manifest:full-path="Pictures/1000000100000350000002543E1D22F5.png" manifest:media-type="image/png"/>
  <manifest:file-entry manifest:full-path="Pictures/1000000000000310000001B4DE381E32.jpg" manifest:media-type="image/jpeg"/>
  <manifest:file-entry manifest:full-path="Pictures/1000000100000215000000EC3D1C2152.png" manifest:media-type="image/png"/>
  <manifest:file-entry manifest:full-path="Pictures/100000010000023C000001B93AAF6853.png" manifest:media-type="image/png"/>
  <manifest:file-entry manifest:full-path="Pictures/100000010000053C0000028752DACC83.png" manifest:media-type="image/png"/>
  <manifest:file-entry manifest:full-path="Pictures/100000010000053C00000287DB20D12A.png" manifest:media-type="image/png"/>
  <manifest:file-entry manifest:full-path="Pictures/1000000100000239000000CAB5711187.png" manifest:media-type="image/png"/>
  <manifest:file-entry manifest:full-path="Pictures/100000010000047600000254982779F4.png" manifest:media-type="image/png"/>
  <manifest:file-entry manifest:full-path="Pictures/1000000100000556000002E4C9E8E729.png" manifest:media-type="image/png"/>
  <manifest:file-entry manifest:full-path="Pictures/100000010000052E0000026FC77A9D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style:font-name="Times New Roman" officeooo:rsid="001ef40e" officeooo:paragraph-rsid="001ef40e"/>
    </style:style>
    <style:style style:name="P2" style:family="paragraph" style:parent-style-name="Text_20_body">
      <style:text-properties style:font-name="Times New Roman" officeooo:rsid="001ef40e" officeooo:paragraph-rsid="001ef40e"/>
    </style:style>
    <style:style style:name="P3" style:family="paragraph" style:parent-style-name="Text_20_body">
      <style:text-properties style:font-name="Times New Roman" officeooo:rsid="002220da" officeooo:paragraph-rsid="002220da"/>
    </style:style>
    <style:style style:name="P4" style:family="paragraph" style:parent-style-name="Heading_20_2">
      <style:text-properties officeooo:paragraph-rsid="001ef40e"/>
    </style:style>
    <style:style style:name="P5" style:family="paragraph" style:parent-style-name="Heading_20_4">
      <style:text-properties officeooo:rsid="001ef40e" officeooo:paragraph-rsid="001ef40e"/>
    </style:style>
    <style:style style:name="P6" style:family="paragraph" style:parent-style-name="Text_20_body">
      <style:text-properties officeooo:rsid="0020d9dc" officeooo:paragraph-rsid="002220da"/>
    </style:style>
    <style:style style:name="P7" style:family="paragraph" style:parent-style-name="Text_20_body">
      <style:text-properties fo:font-weight="normal" officeooo:rsid="0020d9dc" officeooo:paragraph-rsid="002220da" style:font-weight-asian="normal" style:font-weight-complex="normal"/>
    </style:style>
    <style:style style:name="P8" style:family="paragraph" style:parent-style-name="Heading_20_4">
      <style:text-properties officeooo:rsid="0022b789" officeooo:paragraph-rsid="0022b789"/>
    </style:style>
    <style:style style:name="P9" style:family="paragraph" style:parent-style-name="Text_20_body">
      <style:text-properties officeooo:rsid="0022b789" officeooo:paragraph-rsid="0022b789"/>
    </style:style>
    <style:style style:name="P10" style:family="paragraph" style:parent-style-name="Heading_20_4">
      <style:text-properties officeooo:rsid="002585fb" officeooo:paragraph-rsid="002585fb"/>
    </style:style>
    <style:style style:name="P11" style:family="paragraph" style:parent-style-name="Text_20_body">
      <style:text-properties officeooo:rsid="002fd47f" officeooo:paragraph-rsid="002fd47f"/>
    </style:style>
    <style:style style:name="P12" style:family="paragraph" style:parent-style-name="Heading_20_4">
      <style:text-properties officeooo:paragraph-rsid="003156f3"/>
    </style:style>
    <style:style style:name="P13" style:family="paragraph" style:parent-style-name="Text_20_body">
      <style:text-properties officeooo:rsid="003156f3" officeooo:paragraph-rsid="003156f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f40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fd47f"/>
    </style:style>
    <style:style style:name="T6" style:family="text">
      <style:text-properties officeooo:rsid="002568bc"/>
    </style:style>
    <style:style style:name="T7" style:family="text">
      <style:text-properties officeooo:rsid="002585fb"/>
    </style:style>
    <style:style style:name="T8" style:family="text">
      <style:text-properties officeooo:rsid="0026cff1"/>
    </style:style>
    <style:style style:name="T9" style:family="text">
      <style:text-properties officeooo:rsid="0027ff01"/>
    </style:style>
    <style:style style:name="T10" style:family="text">
      <style:text-properties officeooo:rsid="002b0df5"/>
    </style:style>
    <style:style style:name="T11" style:family="text">
      <style:text-properties officeooo:rsid="002cc7db"/>
    </style:style>
    <style:style style:name="T12" style:family="text">
      <style:text-properties officeooo:rsid="003156f3"/>
    </style:style>
    <style:style style:name="T13" style:family="text">
      <style:text-properties officeooo:rsid="00324f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Arnold Sam Rume</text:h>
      <text:p text:style-name="P2">Born 8<text:span text:style-name="T1">th</text:span> September 2006</text:p>
      <text:p text:style-name="P2">Software Engineering Student at Kirinyaga University</text:p>
      <text:p text:style-name="P3">Github profile: <text:a xlink:type="simple" xlink:href="https://raxine091.github.io/Web-Technologies/" text:style-name="Internet_20_link" text:visited-style-name="Visited_20_Internet_20_Link">https://raxine091.github.io/</text:a></text:p>
      <text:h text:style-name="P4" text:outline-level="2" text:is-list-header="true"><text:line-break/><text:span text:style-name="T2"> Notable </text:span><text:span text:style-name="T3">Projects:</text:span></text:h>
      <text:h text:style-name="P5" text:outline-level="4">1. Basic website</text:h>
      <text:p text:style-name="P6">Created a basic 1 page website (<text:span text:style-name="T2">Raxine Dishes), </text:span><text:span text:style-name="T4">a restaurant menu website that lists dishes in a table.</text:span></text:p>
      <text:p text:style-name="P7"><text:a xlink:type="simple" xlink:href="https://raxine091.github.io/Web-Technologies/" text:style-name="Internet_20_link" text:visited-style-name="Visited_20_Internet_20_Link">https://raxine091.github.io/Web-Technologies/</text:a></text:p>
      <text:h text:style-name="P8" text:outline-level="4"/>
      <text:h text:style-name="P8" text:outline-level="4"><draw:frame draw:style-name="fr1" draw:name="Image1" text:anchor-type="char" svg:x="0in" svg:y="-0.1043in" svg:width="5.4417in" svg:height="2.6854in" draw:z-index="0"><draw:image xlink:href="Pictures/100000010000052E0000026FC77A9D2F.png" xlink:type="simple" xlink:show="embed" xlink:actuate="onLoad" draw:mime-type="image/png"/></draw:frame>2. Basic interactive website with multiple landing pages</text:h>
      <text:p text:style-name="P9">The website created was for a <text:span text:style-name="T5">theoretic </text:span>e-commerce company – Smartedge Technologies.<text:line-break/><text:a xlink:type="simple" xlink:href="https://smartedge-store.onrender.com/" text:style-name="Internet_20_link" text:visited-style-name="Visited_20_Internet_20_Link"><text:span text:style-name="T6">https://smartedge-store.onrender.com</text:span></text:a></text:p>
      <text:p text:style-name="P9"><draw:frame draw:style-name="fr1" draw:name="Image2" text:anchor-type="char" svg:x="0.1547in" svg:y="0.0598in" svg:width="5.4429in" svg:height="2.6681in" draw:z-index="1"><draw:image xlink:href="Pictures/1000000100000556000002E4C9E8E729.png" xlink:type="simple" xlink:show="embed" xlink:actuate="onLoad" draw:mime-type="image/png"/></draw:frame></text:p>
      <text:p text:style-name="P9"><draw:frame draw:style-name="fr1" draw:name="Image3" text:anchor-type="char" svg:x="-0.1563in" svg:y="-0.3256in" svg:width="6.9252in" svg:height="3.3437in" draw:z-index="2"><draw:image xlink:href="Pictures/100000010000053C00000287DB20D12A.png" xlink:type="simple" xlink:show="embed" xlink:actuate="onLoad" draw:mime-type="image/png"/></draw:frame><draw:frame draw:style-name="fr1" draw:name="Image4" text:anchor-type="char" svg:x="-0.0783in" svg:y="3.2118in" svg:width="6.9252in" svg:height="3.3437in" draw:z-index="3"><draw:image xlink:href="Pictures/100000010000053C0000028752DACC83.png" xlink:type="simple" xlink:show="embed" xlink:actuate="onLoad" draw:mime-type="image/png"/></draw:frame><text:soft-page-break/></text:p>
      <text:p text:style-name="P9"><draw:frame draw:style-name="fr2" draw:name="Image10" text:anchor-type="char" svg:x="-0.0134in" svg:y="-0.0902in" svg:width="6.9252in" svg:height="3.2035in" draw:z-index="4"><draw:image xlink:href="Pictures/100000010000047600000254982779F4.png" xlink:type="simple" xlink:show="embed" xlink:actuate="onLoad" draw:mime-type="image/png"/></draw:frame></text:p>
      <text:h text:style-name="P10" text:outline-level="4"><text:soft-page-break/>3. Database Management (MySQL, PHPMyAdmin, Apache)</text:h>
      <text:p text:style-name="P11">A database was created (HRDB) locally and tables created successfully. XAMMP was used to start the local servers<text:line-break/><text:span text:style-name="T7">Database management techni</text:span><text:span text:style-name="T8">ques applied successfully : Creation, Insertion, Updating, Deletion.<text:line-break/></text:span>Queries made returned valid results.<text:span text:style-name="T8"><text:line-break/><text:line-break/></text:span><draw:frame draw:style-name="fr1" draw:name="Image5" text:anchor-type="char" svg:x="0.2453in" svg:y="4.8728in" svg:width="5.552in" svg:height="2.4583in" draw:z-index="5"><draw:image xlink:href="Pictures/1000000100000215000000EC3D1C2152.png" xlink:type="simple" xlink:show="embed" xlink:actuate="onLoad" draw:mime-type="image/png"/></draw:frame><draw:frame draw:style-name="fr1" draw:name="Image8" text:anchor-type="char" svg:x="0.0799in" svg:y="1.0098in" svg:width="5.9583in" svg:height="3.5945in" draw:z-index="8"><draw:image xlink:href="Pictures/100000010000023C000001B93AAF6853.png" xlink:type="simple" xlink:show="embed" xlink:actuate="onLoad" draw:mime-type="image/png"/></draw:frame><draw:frame draw:style-name="fr2" draw:name="Image9" text:anchor-type="char" svg:x="0.2646in" svg:y="7.4575in" svg:width="5.9272in" svg:height="2.1043in" draw:z-index="9"><draw:image xlink:href="Pictures/1000000100000239000000CAB5711187.png" xlink:type="simple" xlink:show="embed" xlink:actuate="onLoad" draw:mime-type="image/png"/></draw:frame></text:p>
      <text:h text:style-name="Heading_20_4" text:outline-level="4"><text:soft-page-break/><text:line-break/><text:line-break/><text:span text:style-name="T9">4. Bookstore Billing System (Visual Basic)</text:span></text:h>
      <text:p text:style-name="Text_20_body"><text:span text:style-name="T10">This project was done when learning the basic concepts of GUI. <text:line-break/>Visual Basic in visual studio community was used in it’s development. The final product is a windows executable file that calculates total price of goods bought from the bookstore </text:span><text:span text:style-name="T11">imposing a 5% tax</text:span><text:span text:style-name="T10"> and then produces a receipt. The app is not fully integrated with a working database.</text:span><draw:frame draw:style-name="fr1" draw:name="Image6" text:anchor-type="char" svg:x="-0.1563in" svg:y="0.9327in" svg:width="6.9252in" svg:height="3.3335in" draw:z-index="6"><draw:image xlink:href="Pictures/1000000000000310000001B4DE381E32.jpg" xlink:type="simple" xlink:show="embed" xlink:actuate="onLoad" draw:mime-type="image/jpeg"/></draw:frame><draw:frame draw:style-name="fr1" draw:name="Image7" text:anchor-type="char" svg:x="-0.0717in" svg:y="4.5909in" svg:width="3.6563in" svg:height="4.0598in" draw:z-index="7"><draw:image xlink:href="Pictures/100000000000015F00000217466655E4.jpg" xlink:type="simple" xlink:show="embed" xlink:actuate="onLoad" draw:mime-type="image/jpeg"/></draw:frame><text:span text:style-name="T10"><text:line-break/><text:line-break/><text:line-break/><text:line-break/></text:span></text:p>
      <text:h text:style-name="P12" text:outline-level="4"><text:soft-page-break/><text:span text:style-name="T12">5. Number </text:span><text:span text:style-name="T13">system</text:span><text:span text:style-name="T12"> converter</text:span></text:h>
      <text:p text:style-name="P13">A web-page that uses digital logic to convert <text:span text:style-name="T13">numbers in the various number systems to a desired system. </text:span><text:a xlink:type="simple" xlink:href="https://raxine091.github.io/Number-System-Converter./" text:style-name="Internet_20_link" text:visited-style-name="Visited_20_Internet_20_Link"><text:span text:style-name="T13">https://raxine091.github.io/Number-System-Converter./</text:span></text:a><text:span text:style-name="T13"> </text:span></text:p>
      <text:p text:style-name="P13">The web-page uses the front-end languages (HTML, CSS, JS) </text:p>
      <text:p text:style-name="P13">It also shows the conversion steps – the logic.</text:p>
      <text:p text:style-name="P13"><draw:frame draw:style-name="fr1" draw:name="Image11" text:anchor-type="char" svg:x="0in" svg:y="-0.0126in" svg:width="6.9252in" svg:height="3.928in" draw:z-index="10"><draw:image xlink:href="Pictures/100000010000035000000254E2B2389B.png" xlink:type="simple" xlink:show="embed" xlink:actuate="onLoad" draw:mime-type="image/png"/></draw:frame><draw:frame draw:style-name="fr1" draw:name="Image12" text:anchor-type="char" svg:x="0.0008in" svg:y="4.0965in" svg:width="6.9252in" svg:height="4.3055in" draw:z-index="11"><draw:image xlink:href="Pictures/1000000100000350000002543E1D22F5.png" xlink:type="simple" xlink:show="embed" xlink:actuate="onLoad" draw:mime-type="image/png"/></draw:frame></text:p>
      <text:p text:style-name="P9"><draw:frame draw:style-name="fr1" draw:name="Image13" text:anchor-type="char" svg:x="0.0909in" svg:y="-0.0165in" svg:width="6.9252in" svg:height="4.5634in" draw:z-index="12"><draw:image xlink:href="Pictures/1000000100000350000002548E5B8F92.png" xlink:type="simple" xlink:show="embed" xlink:actuate="onLoad" draw:mime-type="image/png"/></draw:frame><text:soft-page-break/></text:p>
      <text:p text:style-name="P9"/>
      <text:p text:style-name="P9"><text:line-break/></text:p>
      <text:p text:style-name="P9"/>
      <text:p text:style-name="P9"><text:line-break/></text:p>
      <text:p text:style-name="Text_20_body"><text:span text:style-name="T10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382in" fo:margin-bottom="0.088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16:59:22.299384685</meta:creation-date>
    <dc:date>2026-05-06T13:22:43.791374768</dc:date>
    <meta:editing-duration>PT19H32M2S</meta:editing-duration>
    <meta:editing-cycles>6</meta:editing-cycles>
    <meta:generator>LibreOffice/25.8.6.2$Linux_X86_64 LibreOffice_project/580$Build-2</meta:generator>
    <meta:print-date>2026-05-05T23:11:06.964796066</meta:print-date>
    <meta:printed-by>PDF files</meta:printed-by>
    <meta:document-statistic meta:table-count="0" meta:image-count="13" meta:object-count="0" meta:page-count="6" meta:paragraph-count="21" meta:word-count="204" meta:character-count="1479" meta:non-whitespace-character-count="1274"/>
  </office:meta>
</office:document-meta>
</file>